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 Linotype" svg:font-family="'Palatino Linotype'" style:font-family-generic="roman" style:font-pitch="variable"/>
  </office:font-face-decls>
  <office:automatic-styles>
    <style:style style:name="P1" style:family="paragraph" style:parent-style-name="Standard">
      <style:text-properties style:font-name="Palatino Linotype" officeooo:rsid="000ccef1" officeooo:paragraph-rsid="000ccef1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ccef1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ccef1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6pt" fo:font-weight="bold" officeooo:paragraph-rsid="000ccef1" style:font-size-asian="16pt" style:font-weight-asian="bold" style:font-size-complex="16pt" style:font-weight-complex="bold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T1" style:family="text">
      <style:text-properties style:font-name="Palatino Linotype" officeooo:rsid="000ccef1"/>
    </style:style>
    <style:style style:name="T2" style:family="text">
      <style:text-properties style:font-name="Palatino Linotype" officeooo:rsid="000ccef1" loext:padding="0cm" loext:border="none"/>
    </style:style>
    <style:style style:name="T3" style:family="text">
      <style:text-properties style:font-name="Palatino Linotype" fo:font-size="16pt" fo:font-weight="bold" officeooo:rsid="000ccef1" style:font-size-asian="16pt" style:font-weight-asian="bold" style:font-size-complex="16pt" style:font-weight-complex="bold"/>
    </style:style>
    <style:style style:name="T4" style:family="text">
      <style:text-properties style:font-name="Palatino Linotype" fo:font-weight="bold" officeooo:rsid="000ccef1" style:font-weight-asian="bold" style:font-weight-complex="bold"/>
    </style:style>
    <style:style style:name="T5" style:family="text">
      <style:text-properties loext:padding="0cm" loext:border="none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font-size-asian="16pt" style:font-size-complex="16pt" loext:padding="0cm" loext:border="none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Curso Full Stack - Hashtag</text:span></text:p>
      <text:p text:style-name="P1"><text:span text:style-name="T8"/></text:p>
      <text:p text:style-name="P1"><text:span text:style-name="T8">Como tirar suas dúvidas</text:span> <text:s/></text:p>
      <text:p text:style-name="P1"/>
      <text:p text:style-name="P1"><text:span text:style-name="T5">Todos os nossos </text:span><text:span text:style-name="Strong_20_Emphasis"><text:span text:style-name="T5">Treinamentos Impressionadores</text:span></text:span><text:span text:style-name="T5"> contam com uma equipe especializada para te ajudar com dúvidas técnicas diretamente </text:span><text:span text:style-name="Strong_20_Emphasis"><text:span text:style-name="T5">dentro do portal,</text:span></text:span><text:span text:style-name="T5"> tudo centralizado em um só lugar, pra você ganhar tempo e aprender com mais confiança. 🚀</text:span> <text:line-break/>📍 Onde tirar suas dúvidas<text:line-break/><text:span text:style-name="T5">Em </text:span><text:span text:style-name="Strong_20_Emphasis"><text:span text:style-name="T5">todas as aulas</text:span></text:span><text:span text:style-name="T5">, logo abaixo do player do vídeo, você vai encontrar a </text:span><text:span text:style-name="Strong_20_Emphasis"><text:span text:style-name="T5">área de dúvidas</text:span></text:span><text:span text:style-name="T5">.</text:span><text:line-break/><text:span text:style-name="T5">É ali que você pode enviar sua pergunta e também visualizar as dúvidas enviadas por outros alunos, o que pode te ajudar a resolver seu problema de forma ainda mais rápida.</text:span><text:line-break/><text:line-break/><text:span text:style-name="T5">⚠️ Lembrando: os cursos </text:span><text:span text:style-name="Strong_20_Emphasis"><text:span text:style-name="T5">complementares ou bônus</text:span></text:span><text:span text:style-name="T5"> não possuem área de dúvidas, ok?</text:span><text:line-break/><text:line-break/><text:span text:style-name="Strong_20_Emphasis"><text:span text:style-name="T5">🔎 Antes de enviar sua dúvida…</text:span></text:span><text:line-break/><text:span text:style-name="T5">Dê uma olhadinha se alguém já perguntou algo parecido.</text:span><text:line-break/><text:span text:style-name="T5">Muitas vezes, outro aluno pode ter passado pela mesma situação, e a resposta já está disponível lá no portal. </text:span><text:line-break/><text:line-break/><text:span text:style-name="T5">✉️ Para enviar uma nova dúvida</text:span></text:p>
      <text:list text:style-name="L1">
        <text:list-item>
          <text:p text:style-name="P3"><text:span text:style-name="T5">Acesse a </text:span><text:span text:style-name="Strong_20_Emphasis"><text:span text:style-name="T5">guia “Dúvidas”</text:span></text:span><text:span text:style-name="T5"> dentro da aula.</text:span></text:p>
        </text:list-item>
        <text:list-item>
          <text:p text:style-name="P3"><text:span text:style-name="T5">Clique em </text:span><text:span text:style-name="Strong_20_Emphasis"><text:span text:style-name="T5">“Adicionar dúvida”</text:span></text:span><text:span text:style-name="T5">.</text:span></text:p>
        </text:list-item>
        <text:list-item>
          <text:p text:style-name="P4"><text:span text:style-name="T5">Escolha uma das opções que aparecerão no pop-up.</text:span></text:p>
        </text:list-item>
      </text:list>
      <text:p text:style-name="P6"><text:line-break/><text:span text:style-name="Strong_20_Emphasis"><text:span text:style-name="T5">🤖 Hashbot: ajuda instantânea</text:span></text:span><text:line-break/><text:span text:style-name="T5">O </text:span><text:span text:style-name="Strong_20_Emphasis"><text:span text:style-name="T5">Hashbot</text:span></text:span><text:span text:style-name="T5"> é a nossa inteligência artificial, baseada no ChatGPT, e pode te ajudar </text:span><text:span text:style-name="Strong_20_Emphasis"><text:span text:style-name="T5">na hora</text:span></text:span><text:span text:style-name="T5"> com respostas automáticas e contextualizadas sobre o curso.</text:span><text:line-break/><text:span text:style-name="T5">Basta selecionar a opção Hashbot e digitar sua dúvida. Ele está sempre disponível pra agilizar seu aprendizado. </text:span><text:line-break/><text:line-break/><text:span text:style-name="Strong_20_Emphasis"><text:span text:style-name="T5">👨‍🏫 Expert da Hashtag</text:span></text:span><text:line-break/><text:span text:style-name="T5">Se preferir o suporte humano, você também pode contar com nossos </text:span><text:span text:style-name="Strong_20_Emphasis"><text:span text:style-name="T5">Experts da Hashtag</text:span></text:span><text:span text:style-name="T5">, profissionais altamente qualificados que respondem suas dúvidas em até </text:span><text:span text:style-name="Strong_20_Emphasis"><text:span text:style-name="T5">24 horas úteis</text:span></text:span><text:span text:style-name="T5">.</text:span><text:line-break/><text:line-break/><text:span text:style-name="Emphasis"><text:span text:style-name="T5">OBS: O time de Experts não executa a tarefa por você, mas vai te orientar passo a passo para que </text:span></text:span><text:span text:style-name="Strong_20_Emphasis"><text:span text:style-name="Emphasis"><text:span text:style-name="T5">você mesmo consiga resolver</text:span></text:span></text:span><text:span text:style-name="Emphasis"><text:span text:style-name="T5"> e evoluir de forma independente. </text:span></text:span><text:line-break/><text:line-break/><text:span text:style-name="Emphasis"><text:span text:style-name="T5">OBS2: Caso tenha escolhido o Expert, escreva sua dúvida com o </text:span></text:span><text:span text:style-name="Strong_20_Emphasis"><text:span text:style-name="Emphasis"><text:span text:style-name="T5">máximo de detalhes possível</text:span></text:span></text:span><text:span text:style-name="Emphasis"><text:span text:style-name="T5">, se puder, envie </text:span></text:span><text:span text:style-name="Strong_20_Emphasis"><text:span text:style-name="Emphasis"><text:span text:style-name="T5">prints ou pequenos vídeos</text:span></text:span></text:span><text:span text:style-name="Emphasis"><text:span text:style-name="T5"> mostrando o que está acontecendo. Isso ajuda muito na hora de entender e te orientar direitinho!</text:span></text:span></text:p>
      <text:p text:style-name="P6"><text:span text:style-name="Emphasis"><text:span text:style-name="T5"/></text:span></text:p>
      <text:p text:style-name="P6"><text:span text:style-name="Emphasis"><text:span text:style-name="T9"/></text:span></text:p>
      <text:p text:style-name="P6"><text:soft-page-break/><text:span text:style-name="Emphasis"><text:span text:style-name="T9">Suporte, Nota Fiscal e Carteirinha de Estudante </text:span></text:span></text:p>
      <text:p text:style-name="P6"><text:s/><text:span text:style-name="Strong_20_Emphasis"><text:span text:style-name="T2">Precisa de ajuda?</text:span></text:span><text:span text:style-name="T1"> <text:line-break/></text:span><text:span text:style-name="T2">Nosso </text:span><text:span text:style-name="Strong_20_Emphasis"><text:span text:style-name="T2">time de suporte</text:span></text:span><text:span text:style-name="T2"> está pronto para te auxiliar com qualquer dúvida sobre o curso!</text:span><text:span text:style-name="T1"><text:line-break/><text:line-break/></text:span><text:span text:style-name="T2">📧 E-mail oficial: </text:span><text:span text:style-name="Strong_20_Emphasis"><text:span text:style-name="T2">suporte@hashtagtreinamentos.com</text:span></text:span><text:span text:style-name="T1"><text:line-break/></text:span><text:span text:style-name="T2">⌛ Prazo de resposta: </text:span><text:span text:style-name="Strong_20_Emphasis"><text:span text:style-name="T2">até 24h úteis</text:span></text:span><text:span text:style-name="T1"><text:line-break/><text:line-break/></text:span><text:span text:style-name="Strong_20_Emphasis"><text:span text:style-name="T2">Dúvidas sobre conteúdo?</text:span></text:span><text:span text:style-name="T1"><text:line-break/></text:span><text:span text:style-name="T2">Tire suas dúvidas no campo de perguntas dentro das aulas e conte com o apoio de colegas e especialistas da Hashtag!</text:span><text:span text:style-name="T1"><text:line-break/><text:line-break/></text:span><text:span text:style-name="Strong_20_Emphasis"><text:span text:style-name="T2">Nota Fiscal 🧾</text:span></text:span><text:span text:style-name="T1"><text:line-break/></text:span><text:span text:style-name="T2">A nota fiscal da sua compra é emitida </text:span><text:span text:style-name="Strong_20_Emphasis"><text:span text:style-name="T2">após 30 dias</text:span></text:span><text:span text:style-name="T2">, ou seja, depois do período de garantia.</text:span><text:span text:style-name="T1"><text:line-break/><text:line-break/></text:span><text:span text:style-name="Strong_20_Emphasis"><text:span text:style-name="T2">Carteirinha de Estudante 🎓</text:span></text:span><text:span text:style-name="T1"><text:line-break/></text:span><text:span text:style-name="T2">Alunos da Hashtag podem aproveitar o benefício de </text:span><text:span text:style-name="Strong_20_Emphasis"><text:span text:style-name="T2">carteirinha de estudante</text:span></text:span><text:span text:style-name="T2">!</text:span><text:span text:style-name="T1"><text:line-break/></text:span><text:span text:style-name="T2">Para solicitar a sua, você pode acessar </text:span><text:span text:style-name="Strong_20_Emphasis"><text:span text:style-name="T2">a área de “Carteirinha” no </text:span></text:span><text:span text:style-name="T2">menu suspenso, ao lado do seu nome, no canto superior da tela. </text:span><text:span text:style-name="T1"><text:line-break/>﻿<text:line-break/></text:span><text:span text:style-name="Strong_20_Emphasis"><text:span text:style-name="T2">Não fique com dúvidas!</text:span></text:span><text:span text:style-name="T1"><text:line-break/></text:span><text:span text:style-name="T2">Se tiver qualquer dificuldade ou pergunta, </text:span><text:span text:style-name="Strong_20_Emphasis"><text:span text:style-name="T2">peça ajuda</text:span></text:span><text:span text:style-name="T2">! Estamos aqui para garantir que sua jornada seja incrível.</text:span><text:span text:style-name="T1"> </text:span></text:p>
      <text:p text:style-name="P7"><text:span text:style-name="T1"/></text:p>
      <text:p text:style-name="P7"><text:span text:style-name="T1">Como acessar a apostila e os materiais do curso </text:span></text:p>
      <text:p text:style-name="P6"><text:span text:style-name="T1"><text:s/></text:span><text:span text:style-name="T2">A apostila do curso já está disponível logo abaixo, na seção </text:span><text:span text:style-name="Strong_20_Emphasis"><text:span text:style-name="T2">“Downloads”</text:span></text:span><text:span text:style-name="T2">. É só clicar no link e baixar o arquivo em PDF direto para o seu dispositivo — simples e rápido!</text:span><text:span text:style-name="T1"> <text:line-break/>Além da apostila principal, sempre que o professor citar algum </text:span><text:span text:style-name="Strong_20_Emphasis"><text:span text:style-name="T2">material complementar</text:span></text:span><text:span text:style-name="T2"> durante as aulas (como planilhas, exercícios extras ou PDFs de apoio), você também vai encontrar tudo organizado nessa mesma área de </text:span><text:span text:style-name="Strong_20_Emphasis"><text:span text:style-name="T2">Downloads</text:span></text:span><text:span text:style-name="T2">, logo abaixo do player de vídeo.</text:span><text:span text:style-name="T1"><text:line-break/><text:line-break/>Fique tranquilo: </text:span><text:span text:style-name="Strong_20_Emphasis"><text:span text:style-name="T2">sempre que o curso for atualizado</text:span></text:span><text:span text:style-name="T2">, todos os materiais passam por revisão também. Assim, você terá acesso à versão mais recente e completa de tudo o que precisar para acompanhar as aulas com qualidade.</text:span><text:span text:style-name="T1"><text:line-break/>Ah, e só mais um lembrete importante: todo o conteúdo disponibilizado é </text:span><text:span text:style-name="Strong_20_Emphasis"><text:span text:style-name="T2">exclusivo para os alunos</text:span></text:span><text:span text:style-name="T2"> do curso, então pedimos que ele não seja compartilhado fora da plataforma, tá bom? 😉</text:span><text:span text:style-name="T1"><text:line-break/></text:span></text:p>
      <text:p text:style-name="P6"><text:soft-page-break/><text:span text:style-name="T3">Como conseguir o seu certificado </text:span></text:p>
      <text:p text:style-name="P6"><text:span text:style-name="T2">Assim que você completar a </text:span><text:span text:style-name="Strong_20_Emphasis"><text:span text:style-name="T2">porcentagem mínima exigida</text:span></text:span><text:span text:style-name="T2"> do curso, poderá emitir seu certificado diretamente pela plataforma — de forma simples e rápida!</text:span><text:span text:style-name="T1"> <text:line-break/></text:span><text:span text:style-name="T2">Veja o passo a passo para gerar o seu: 👇</text:span><text:span text:style-name="T1"><text:line-break/><text:line-break/></text:span><text:span text:style-name="T2">1.</text:span><text:span text:style-name="Strong_20_Emphasis"><text:span text:style-name="T2"> Acesse sua conta</text:span></text:span><text:span text:style-name="T2"> normalmente e entre no curso em que deseja gerar o certificado.</text:span><text:span text:style-name="T1"><text:line-break/></text:span><text:span text:style-name="T2">2. Verifique se você já atingiu a porcentagem mínima exigida de conclusão.</text:span><text:span text:style-name="T1"><text:line-break/></text:span><text:span text:style-name="T2">       🔹 </text:span><text:span text:style-name="Emphasis"><text:span text:style-name="T2">Exemplo:</text:span></text:span><text:span text:style-name="T2"> No curso de FullStack, é necessário concluir </text:span><text:span text:style-name="Strong_20_Emphasis"><text:span text:style-name="T2">80% das aulas</text:span></text:span><text:span text:style-name="T2">.</text:span><text:span text:style-name="T1"><text:line-break/></text:span><text:span text:style-name="T2">3. Se já tiver alcançado o percentual necessário, vá até o </text:span><text:span text:style-name="Strong_20_Emphasis"><text:span text:style-name="T2">menu suspenso no canto superior direito da tela</text:span></text:span><text:span text:style-name="T2">, ao lado do seu nome.</text:span><text:span text:style-name="T1"><text:line-break/></text:span><text:span text:style-name="T2">4. Clique em </text:span><text:span text:style-name="Strong_20_Emphasis"><text:span text:style-name="T2">“Certificados”</text:span></text:span><text:span text:style-name="T2">.</text:span><text:span text:style-name="T1"><text:line-break/></text:span><text:span text:style-name="T2">5. Escolha o idioma desejado:</text:span><text:span text:style-name="T1"><text:line-break/></text:span><text:span text:style-name="T2">         Clique na bandeira do Brasil para gerar o certificado em português ou clique na bandeira dos EUA para gerar a versão em inglês.</text:span><text:span text:style-name="T1"><text:line-break/></text:span><text:span text:style-name="T2">6. Pronto! 🎉 O certificado será gerado em PDF e você poderá </text:span><text:span text:style-name="Strong_20_Emphasis"><text:span text:style-name="T2">baixar, imprimir ou compartilhar</text:span></text:span><text:span text:style-name="T2"> como quiser.</text:span><text:span text:style-name="T1"><text:line-break/><text:line-break/></text:span><text:span text:style-name="T2">📝 </text:span><text:span text:style-name="Strong_20_Emphasis"><text:span text:style-name="T2">Importante:</text:span></text:span><text:span text:style-name="T1"><text:line-break/></text:span><text:span text:style-name="T2">O nome exibido no certificado será o mesmo cadastrado no seu perfil. Caso queira ajustar, é só editar seu nome na área de perfil e salvar </text:span><text:span text:style-name="Strong_20_Emphasis"><text:span text:style-name="T2">antes de gerar o certificado</text:span></text:span><text:span text:style-name="T2">.</text:span><text:span text:style-name="T1"><text:line-break/><text:line-break/></text:span><text:span text:style-name="T2">OBS: </text:span><text:span text:style-name="T1">Adotamos um prazo mínimo de até 30 dias para liberação de certificados de novos alunos, pois entendemos que esse é um período importante para a consolidação dos estudos e para que o certificado represente, de fato, uma participação real na formação. </text:span></text:p>
      <text:p text:style-name="P7"><text:span text:style-name="T1"/></text:p>
      <text:p text:style-name="P7"><text:span text:style-name="T1">Como funciona a garantia? </text:span></text:p>
      <text:p text:style-name="P2"><text:span text:style-name="T2">Vou te explicar de forma simples e transparente como funciona a nossa garantia. Aqui na Hashtag, a gente leva seu aprendizado (e seus resultados!) a sério, por isso criamos duas formas de garantia pra você se sentir 100% seguro(a) na sua jornada.</text:span><text:span text:style-name="T1"> <text:line-break/></text:span><text:span text:style-name="Strong_20_Emphasis"><text:span text:style-name="T2">✅ Garantia Incondicional – 7 dias</text:span></text:span><text:span text:style-name="T1"><text:line-break/></text:span><text:span text:style-name="T2">Você tem até 7 dias a partir da data da compra para solicitar o cancelamento e o reembolso sem precisar justificar o motivo.</text:span><text:span text:style-name="T1"><text:line-break/><text:line-break/></text:span><text:span text:style-name="T2">Se por qualquer razão quiser sair, é só mandar um e-mail para suporte@hashtagtreinamentos.com dentro desse prazo.</text:span><text:span text:style-name="T1"><text:line-break/></text:span><text:span text:style-name="T2">Nosso time responderá em até 24h úteis (e não se preocupe, pois consideraremos a data da sua solicitação para a execução do reembolso), e o valor investido será devolvido integralmente, de acordo com a forma de pagamento utilizada.</text:span><text:span text:style-name="T1"><text:line-break/></text:span><text:soft-page-break/><text:span text:style-name="T1"><text:line-break/></text:span><text:span text:style-name="T2">⚠️ Após esse prazo de 7 dias, </text:span><text:span text:style-name="Strong_20_Emphasis"><text:span text:style-name="T2">não será mais possível solicitar o reembolso ou o cancelamento de parcelas pendentes.</text:span></text:span><text:span text:style-name="T1"><text:line-break/></text:span><text:span text:style-name="Strong_20_Emphasis"><text:span text:style-name="T2">🔒 Garantia de resultados de 6 Meses – Compromisso com seu sucesso</text:span></text:span><text:span text:style-name="T1"><text:line-break/><text:line-break/></text:span><text:span text:style-name="T2">Além da garantia de 7 dias, também oferecemos uma garantia de resultados de 6 meses, como uma prova do quanto acreditamos no nosso método.</text:span><text:span text:style-name="T1"><text:line-break/><text:line-break/></text:span><text:span text:style-name="T2">Essa garantia é um compromisso da Hashtag Treinamentos: se você seguir todos os passos do curso e, mesmo assim, não tiver nenhum resultado relevante na sua carreira em até 6 meses, devolvemos 100% do valor pago. Para isso, é necessário:</text:span></text:p>
      <text:list text:style-name="L2">
        <text:list-item>
          <text:p text:style-name="P8"><text:span text:style-name="T5">Assistir ao curso Impressionador de forma consistente ao longo do tempo (só marcar como “concluído” sem assistir de verdade não vale, e também não adianta maratonar tudo de uma vez só);</text:span></text:p>
        </text:list-item>
        <text:list-item>
          <text:p text:style-name="P8"><text:span text:style-name="T5">Fazer todos os exercícios, inclusive os práticos, enviando as evidências solicitadas;</text:span></text:p>
        </text:list-item>
        <text:list-item>
          <text:p text:style-name="P8"><text:span text:style-name="T5">Criar e entregar os projetos propostos, quando houver;</text:span></text:p>
        </text:list-item>
        <text:list-item>
          <text:p text:style-name="P9"><text:span text:style-name="T5">Aplicar o que aprendeu na prática, buscando gerar resultados reais (como promoções, destaque na empresa, vendas ou apresentações de projetos).</text:span></text:p>
        </text:list-item>
      </text:list>
      <text:p text:style-name="P5"><text:line-break/><text:span text:style-name="T5">Se, mesmo fazendo tudo isso, você não tiver nenhum resultado concreto em até 6 meses após a matrícula, pode pedir o reembolso integral.</text:span><text:line-break/><text:line-break/><text:span text:style-name="T5">Nesse caso, é só enviar um e-mail para suporte@hashtagtreinamentos.com com:</text:span><text:line-break/><text:line-break/><text:span text:style-name="T5">﻿Uma explicação sobre a falta de resultados;</text:span><text:line-break/><text:span text:style-name="T5">E os materiais que provam que você fez tudo direitinho (exercícios, projetos e aplicações práticas).</text:span> </text:p>
      <text:p text:style-name="P7"><text:span text:style-name="T1"/></text:p>
      <text:p text:style-name="P7"><text:span text:style-name="T1">Plantão de Dúvidas de Full Stack </text:span></text:p>
      <text:p text:style-name="P6"><text:span text:style-name="T1">Fala, Impressionadores! <text:line-break/>De 15 em 15 dias vamos fazer uma mentoria por videoconferência (Google Meeting) pra ser mais uma forma de </text:span><text:span text:style-name="Strong_20_Emphasis"><text:span text:style-name="T2">tirar as dúvidas de vocês.</text:span></text:span><text:span text:style-name="T1"><text:line-break/><text:line-break/>O plantão de dúvidas de Full Stack (no qual podemos falar sobre todas as linguagens e tecnologias do Desenvolvimento Web) será sempre às </text:span><text:span text:style-name="Strong_20_Emphasis"><text:span text:style-name="T2">quartas-feiras, das 19h às 21h.</text:span></text:span><text:span text:style-name="T1"><text:line-break/><text:line-break/>Os próximos plantões vão rolar nas seguintes datas:</text:span><text:span text:style-name="Strong_20_Emphasis"><text:span text:style-name="T2"> 08/out e 22/out.</text:span></text:span><text:span text:style-name="T1"><text:line-break/><text:line-break/></text:span><text:span text:style-name="Strong_20_Emphasis"><text:span text:style-name="T2">Agora, importante:</text:span></text:span><text:span text:style-name="T1"> pra que o plantão de dúvidas seja o mais eficiente e organizado possível, vamos organizar todas as dúvidas dentro da </text:span><text:span text:style-name="Strong_20_Emphasis"><text:span text:style-name="T2">área de dúvidas dessa aula.</text:span></text:span><text:span text:style-name="T1"><text:line-break/><text:line-break/>Logo, para que sua dúvida seja tirada durante a mentoria, basta </text:span><text:span text:style-name="Strong_20_Emphasis"><text:span text:style-name="T2">enviar aqui embaixo na </text:span></text:span><text:soft-page-break/><text:span text:style-name="Strong_20_Emphasis"><text:span text:style-name="T2">área de dúvidas </text:span></text:span><text:span text:style-name="T1">que a gente vai resolver ela ao vivo junto com você!<text:line-break/><text:line-break/>O plantão de dúvidas irá durar cerca de 2h, e as dúvidas serão tiradas na frente de todos os alunos presentes, de acordo com a ordem de envio da dúvida aqui no Portal.<text:line-break/><text:line-break/>Importante reforçar que pode ser que a gente consiga tirar todas as dúvidas, mas pode ser que não dê tempo de tirar todas. Todos os plantões serão gravados e disponibilizados nessa pasta: </text:span><text:a xlink:type="simple" xlink:href="https://drive.google.com/drive/folders/1_4KDKIuglYkVjCSpmCBpODsXuuZj1kZL?usp=drive_link" office:target-frame-name="_blank" xlink:show="new" text:style-name="Internet_20_link" text:visited-style-name="Visited_20_Internet_20_Link"><text:span text:style-name="T2">https://drive.google.com/drive/folders/1_4KDKIuglYkVjCSpmCBpODsXuuZj1kZL?usp=drive_link</text:span></text:a><text:span text:style-name="T1"><text:line-break/><text:line-break/>Mas lembre que os plantões vão acontecer a cada 15 dias, então se você não conseguir tirar sua dúvida nesse encontro, vai poder enviar novamente a sua dúvida e ter a oportunidade de tirar a sua dúvida ao vivo.<text:line-break/><text:line-break/>O próximo Plantão de Dúvidas vai rolar no dia</text:span><text:span text:style-name="Strong_20_Emphasis"><text:span text:style-name="T2"> 08/out</text:span></text:span><text:span text:style-name="T1"> , nesse link: <text:line-break/><text:line-break/></text:span><text:a xlink:type="simple" xlink:href="https://us06web.zoom.us/pt/join" office:target-frame-name="_blank" xlink:show="new" text:style-name="Internet_20_link" text:visited-style-name="Visited_20_Internet_20_Link"><text:span text:style-name="T2">https://us06web.zoom.us/pt/join</text:span></text:a><text:span text:style-name="T1"><text:line-break/><text:line-break/>Acesse o link e coloque o ID da Reunião, que está abaixo e depois a senha, também a abaixo<text:line-break/><text:line-break/></text:span><text:span text:style-name="T3">ID: 832 4765 8731<text:line-break/>Senha: 683363</text:span><text:span text:style-name="T1"><text:line-break/><text:line-break/>Mais perto da data vamos te lembrar por e-mail, também!<text:line-break/><text:line-break/>Antes de você preencher a sua dúvida, só algumas instruções:<text:line-break/><text:line-break/></text:span><text:span text:style-name="Strong_20_Emphasis"><text:span text:style-name="T2">1)</text:span></text:span><text:span text:style-name="T1"> Seja o mais detalhado e específico possível sobre a sua dúvida. A ideia é justamente a gente ter tempo de olhar as dúvidas antes do plantão e preparar a melhor explicação e direcionamento<text:line-break/><text:line-break/></text:span><text:span text:style-name="Strong_20_Emphasis"><text:span text:style-name="T2">2)</text:span></text:span><text:span text:style-name="T1"> Você pode anexar arquivo pra ajudar a gente a entender sua dúvida. Pode ser um arquivo .html, um .css, um .js, um vídeo seu explicando, uma foto, o que você quiser (até mesmo mais de um arquivo)<text:line-break/><text:line-break/></text:span><text:span text:style-name="Strong_20_Emphasis"><text:span text:style-name="T2">3)</text:span></text:span><text:span text:style-name="T1"> Lembrando que não é uma consultoria. Então precisa ser de fato uma dúvida que possa </text:span><text:soft-page-break/><text:span text:style-name="T1">ser respondida, e não um pedido pra resolver algo por você.<text:line-break/><text:line-break/></text:span><text:span text:style-name="Strong_20_Emphasis"><text:span text:style-name="T2">4)</text:span></text:span><text:span text:style-name="T1"> Lembre que o plantão de dúvidas é em grupo, então como sua dúvida será mostrada para os outros, no caso de compartilhar arquivos, garanta que não tem nenhum dado sigiloso (se precisar, substitua por informações fictícias)<text:line-break/><text:line-break/>Te espero lá!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 Linotype" svg:font-family="'Palatino Linotype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9T09:04:56.435000000</meta:creation-date>
    <dc:date>2026-04-29T09:17:07.260000000</dc:date>
    <meta:editing-duration>PT12M16S</meta:editing-duration>
    <meta:editing-cycles>1</meta:editing-cycles>
    <meta:generator>LibreOffice/7.6.6.3$Windows_X86_64 LibreOffice_project/d97b2716a9a4a2ce1391dee1765565ea469b0ae7</meta:generator>
    <meta:document-statistic meta:table-count="0" meta:image-count="0" meta:object-count="0" meta:page-count="6" meta:paragraph-count="22" meta:word-count="1612" meta:character-count="9669" meta:non-whitespace-character-count="8002"/>
  </office:meta>
</office:document-meta>
</file>